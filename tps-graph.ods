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45in"/>
    </style:style>
    <style:style style:name="ro1" style:family="table-row">
      <style:table-row-properties style:row-height="0.79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S" table:style-name="ta1">
        <table:shapes>
          <draw:frame draw:z-index="0" draw:style-name="gr1" draw:text-style-name="P1" svg:width="9.3618in" svg:height="4.6858in" svg:x="0.0902in" svg:y="1.6362in">
            <draw:object draw:notify-on-update-of-ranges="PS.A2:PS.A5 PS.B1:PS.B1 PS.B2:PS.B5 PS.C1:PS.C1 PS.F2:PS.F5 PS.D1:PS.D1 PS.D2:PS.D5 PS.E1:PS.E1 PS.E2:PS.E5 PS.F1:PS.F1 PS.F2:PS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Mysql 9.7.0</text:p>
            <text:p>(bare metal)</text:p>
          </table:table-cell>
          <table:table-cell table:style-name="ce1" office:value-type="string" calcext:value-type="string">
            <text:p>Mysql 9.7.0</text:p>
            <text:p>(k8 port-forward+docker)</text:p>
          </table:table-cell>
          <table:table-cell table:style-name="ce1" office:value-type="string" calcext:value-type="string">
            <text:p>Mysql 9.7.0</text:p>
            <text:p>(k8 Nodeport+docker)</text:p>
          </table:table-cell>
          <table:table-cell table:style-name="ce1" office:value-type="string" calcext:value-type="string">
            <text:p>Mysql 9.7.0</text:p>
            <text:p>(k8 LB+docker)</text:p>
          </table:table-cell>
          <table:table-cell table:style-name="ce1" office:value-type="string" calcext:value-type="string">
            <text:p>Mysql 9.7.0</text:p>
            <text:p>(k8 Nodeport+containerd)</text:p>
          </table:table-cell>
          <table:table-cell table:style-name="ce1" office:value-type="string" calcext:value-type="string">
            <text:p>Base bare metal</text:p>
            <text:p><text:span text:style-name="T1">(%diff k8 portforward+docker)</text:span></text:p>
          </table:table-cell>
          <table:table-cell table:style-name="ce1" office:value-type="string" calcext:value-type="string">
            <text:p>Base bare metal</text:p>
            <text:p><text:span text:style-name="T1">(%diff k8 Nodeport+docker)</text:span></text:p>
          </table:table-cell>
          <table:table-cell table:style-name="ce1" office:value-type="string" calcext:value-type="string">
            <text:p>Base bare metal</text:p>
            <text:p><text:span text:style-name="T1">(%diff k8 LB+docker)</text:span></text:p>
          </table:table-cell>
          <table:table-cell table:style-name="ce1" office:value-type="string" calcext:value-type="string">
            <text:p>Base bare metal</text:p>
            <text:p><text:span text:style-name="T1">(%diff k8 Nodeport+conainerd)</text:span>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8036.3" calcext:value-type="float">
            <text:p>28036.3</text:p>
          </table:table-cell>
          <table:table-cell table:style-name="ce2" office:value-type="float" office:value="3559.63" calcext:value-type="float">
            <text:p>3559.63</text:p>
          </table:table-cell>
          <table:table-cell table:style-name="ce2" office:value-type="float" office:value="12280.62" calcext:value-type="float">
            <text:p>12280.62</text:p>
          </table:table-cell>
          <table:table-cell table:style-name="ce2" office:value-type="float" office:value="12528.32" calcext:value-type="float">
            <text:p>12528.32</text:p>
          </table:table-cell>
          <table:table-cell table:style-name="ce2" office:value-type="float" office:value="21464.4" calcext:value-type="float">
            <text:p>21464.4</text:p>
          </table:table-cell>
          <table:table-cell table:style-name="ce6" table:formula="of:=([.$B2]-[.C2])*100/[.$B2]" office:value-type="float" office:value="87.3034958250554" calcext:value-type="float">
            <text:p>87.30</text:p>
          </table:table-cell>
          <table:table-cell table:style-name="ce6" table:formula="of:=([.$B2]-[.D2])*100/[.$B2]" office:value-type="float" office:value="56.1974297607031" calcext:value-type="float">
            <text:p>56.20</text:p>
          </table:table-cell>
          <table:table-cell table:style-name="ce6" table:formula="of:=([.$B2]-[.E2])*100/[.$B2]" office:value-type="float" office:value="55.3139322949177" calcext:value-type="float">
            <text:p>55.31</text:p>
          </table:table-cell>
          <table:table-cell table:style-name="ce6" table:formula="of:=([.$B2]-[.F2])*100/[.$B2]" office:value-type="float" office:value="23.4406822583579" calcext:value-type="float">
            <text:p>23.44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2371.82" calcext:value-type="float">
            <text:p>52371.82</text:p>
          </table:table-cell>
          <table:table-cell table:style-name="ce2" office:value-type="float" office:value="6099.63" calcext:value-type="float">
            <text:p>6099.63</text:p>
          </table:table-cell>
          <table:table-cell table:style-name="ce2" office:value-type="float" office:value="23091.35" calcext:value-type="float">
            <text:p>23091.35</text:p>
          </table:table-cell>
          <table:table-cell table:style-name="ce2" office:value-type="float" office:value="23259.13" calcext:value-type="float">
            <text:p>23259.13</text:p>
          </table:table-cell>
          <table:table-cell table:style-name="ce2" office:value-type="float" office:value="39372.24" calcext:value-type="float">
            <text:p>39372.24</text:p>
          </table:table-cell>
          <table:table-cell table:style-name="ce6" table:formula="of:=([.$B3]-[.C3])*100/[.$B3]" office:value-type="float" office:value="88.3532212552476" calcext:value-type="float">
            <text:p>88.35</text:p>
          </table:table-cell>
          <table:table-cell table:style-name="ce6" table:formula="of:=([.$B3]-[.D3])*100/[.$B3]" office:value-type="float" office:value="55.9088265406854" calcext:value-type="float">
            <text:p>55.91</text:p>
          </table:table-cell>
          <table:table-cell table:style-name="ce6" table:formula="of:=([.$B3]-[.E3])*100/[.$B3]" office:value-type="float" office:value="55.5884634141032" calcext:value-type="float">
            <text:p>55.59</text:p>
          </table:table-cell>
          <table:table-cell table:style-name="ce6" table:formula="of:=([.$B3]-[.F3])*100/[.$B3]" office:value-type="float" office:value="24.8217075518857" calcext:value-type="float">
            <text:p>24.82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86868.2" calcext:value-type="float">
            <text:p>86868.2</text:p>
          </table:table-cell>
          <table:table-cell table:style-name="ce2" office:value-type="float" office:value="9208.46" calcext:value-type="float">
            <text:p>9208.46</text:p>
          </table:table-cell>
          <table:table-cell table:style-name="ce2" office:value-type="float" office:value="39016.07" calcext:value-type="float">
            <text:p>39016.07</text:p>
          </table:table-cell>
          <table:table-cell table:style-name="ce2" office:value-type="float" office:value="38880.1" calcext:value-type="float">
            <text:p>38880.1</text:p>
          </table:table-cell>
          <table:table-cell table:style-name="ce2" office:value-type="float" office:value="65442.19" calcext:value-type="float">
            <text:p>65442.19</text:p>
          </table:table-cell>
          <table:table-cell table:style-name="ce6" table:formula="of:=([.$B4]-[.C4])*100/[.$B4]" office:value-type="float" office:value="89.3995040762903" calcext:value-type="float">
            <text:p>89.40</text:p>
          </table:table-cell>
          <table:table-cell table:style-name="ce6" table:formula="of:=([.$B4]-[.D4])*100/[.$B4]" office:value-type="float" office:value="55.0859002488828" calcext:value-type="float">
            <text:p>55.09</text:p>
          </table:table-cell>
          <table:table-cell table:style-name="ce6" table:formula="of:=([.$B4]-[.E4])*100/[.$B4]" office:value-type="float" office:value="55.2424247307991" calcext:value-type="float">
            <text:p>55.24</text:p>
          </table:table-cell>
          <table:table-cell table:style-name="ce6" table:formula="of:=([.$B4]-[.F4])*100/[.$B4]" office:value-type="float" office:value="24.6649637036338" calcext:value-type="float">
            <text:p>24.66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19438.23" calcext:value-type="float">
            <text:p>119438.23</text:p>
          </table:table-cell>
          <table:table-cell table:style-name="ce2" office:value-type="float" office:value="11740.33" calcext:value-type="float">
            <text:p>11740.33</text:p>
          </table:table-cell>
          <table:table-cell table:style-name="ce2" office:value-type="float" office:value="52888.53" calcext:value-type="float">
            <text:p>52888.53</text:p>
          </table:table-cell>
          <table:table-cell table:style-name="ce2" office:value-type="float" office:value="51029.16" calcext:value-type="float">
            <text:p>51029.16</text:p>
          </table:table-cell>
          <table:table-cell table:style-name="ce2" office:value-type="float" office:value="95500.06" calcext:value-type="float">
            <text:p>95500.06</text:p>
          </table:table-cell>
          <table:table-cell table:style-name="ce6" table:formula="of:=([.$B5]-[.C5])*100/[.$B5]" office:value-type="float" office:value="90.1703750968178" calcext:value-type="float">
            <text:p>90.17</text:p>
          </table:table-cell>
          <table:table-cell table:style-name="ce6" table:formula="of:=([.$B5]-[.D5])*100/[.$B5]" office:value-type="float" office:value="55.7189268461195" calcext:value-type="float">
            <text:p>55.72</text:p>
          </table:table-cell>
          <table:table-cell table:style-name="ce6" table:formula="of:=([.$B5]-[.E5])*100/[.$B5]" office:value-type="float" office:value="57.2756897016977" calcext:value-type="float">
            <text:p>57.28</text:p>
          </table:table-cell>
          <table:table-cell table:style-name="ce6" table:formula="of:=([.$B5]-[.F5])*100/[.$B5]" office:value-type="float" office:value="20.0423013636421" calcext:value-type="float">
            <text:p>20.04</text:p>
          </table:table-cell>
        </table:table-row>
        <table:table-row table:style-name="ro2" table:number-rows-repeated="6">
          <table:table-cell table:number-columns-repeated="10"/>
        </table:table-row>
        <table:table-row table:style-name="ro2" table:number-rows-repeated="3">
          <table:table-cell table:style-name="ce5"/>
          <table:table-cell table:number-columns-repeated="9"/>
        </table:table-row>
        <table:table-row table:style-name="ro2"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 style:data-style-name="N2" text:time-value="10:06:43.9984407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20:43:27.713197849</meta:creation-date>
    <dc:date>2026-05-27T22:18:35.312741681</dc:date>
    <meta:editing-duration>PT18M13S</meta:editing-duration>
    <meta:editing-cycles>5</meta:editing-cycles>
    <meta:generator>LibreOffice/24.2.7.2$Linux_X86_64 LibreOffice_project/420$Build-2</meta:generator>
    <meta:document-statistic meta:table-count="1" meta:cell-count="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78cm" svg:height="11.903cm" xlink:href=".." xlink:type="simple" chart:class="chart:bar" chart:style-name="ch1">
        <chart:title svg:x="10.603cm" svg:y="0.374cm" chart:style-name="ch2">
          <text:p>point-select </text:p>
        </chart:title>
        <chart:subtitle svg:x="6.316cm" svg:y="1.391cm" chart:style-name="ch3">
          <text:p>memory bound( 2 GB BP, 8 tables x 5 million rows=1 GB data)</text:p>
        </chart:subtitle>
        <chart:legend chart:legend-position="bottom" svg:x="2.947cm" svg:y="10.907cm" style:legend-expansion="wide" chart:style-name="ch4"/>
        <chart:plot-area chart:style-name="ch5" table:cell-range-address="PS.A2:PS.B5 PS.B1:PS.F1 PS.D2:PS.F5" chart:data-source-has-labels="both" svg:x="1.486cm" svg:y="2.312cm" svg:width="21.819cm" svg:height="7.192cm">
          <chart:coordinate-region svg:x="2.875cm" svg:y="2.511cm" svg:width="20.43cm" svg:height="6.346cm"/>
          <chart:axis chart:dimension="x" chart:name="primary-x" chart:style-name="ch6" chartooo:axis-type="auto">
            <chartooo:date-scale/>
            <chart:title svg:x="11.809cm" svg:y="9.742cm" chart:style-name="ch7">
              <text:p>threads</text:p>
            </chart:title>
            <chart:categories table:cell-range-address="PS.A2:PS.A5"/>
          </chart:axis>
          <chart:axis chart:dimension="y" chart:name="primary-y" chart:style-name="ch8">
            <chart:title svg:x="0.451cm" svg:y="6.177cm" chart:style-name="ch9">
              <text:p>tps</text:p>
            </chart:title>
            <chart:grid chart:style-name="ch10" chart:class="major"/>
          </chart:axis>
          <chart:series chart:style-name="ch11" chart:values-cell-range-address="PS.B2:PS.B5" chart:label-cell-address="PS.B1:PS.B1" chart:class="chart:bar">
            <chart:data-point chart:repeated="4"/>
          </chart:series>
          <chart:series chart:style-name="ch12" chart:values-cell-range-address="PS.F2:PS.F5" chart:label-cell-address="PS.C1:PS.C1" chart:class="chart:bar">
            <chart:data-point chart:repeated="4"/>
          </chart:series>
          <chart:series chart:style-name="ch13" chart:values-cell-range-address="PS.D2:PS.D5" chart:label-cell-address="PS.D1:PS.D1" chart:class="chart:bar">
            <chart:data-point chart:repeated="4"/>
          </chart:series>
          <chart:series chart:style-name="ch14" chart:values-cell-range-address="PS.E2:PS.E5" chart:label-cell-address="PS.E1:PS.E1" chart:class="chart:bar">
            <chart:data-point chart:repeated="4"/>
          </chart:series>
          <chart:series chart:style-name="ch15" chart:values-cell-range-address="PS.F2:PS.F5" chart:label-cell-address="PS.F1:PS.F1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9.7.0
(bare metal)</text:p>
                <draw:g>
                  <svg:desc>PS.B1:PS.B1</svg:desc>
                </draw:g>
              </table:table-cell>
              <table:table-cell office:value-type="string">
                <text:p>Mysql 9.7.0
(k8 port-forward+docker)</text:p>
                <draw:g>
                  <svg:desc>PS.C1:PS.C1</svg:desc>
                </draw:g>
              </table:table-cell>
              <table:table-cell office:value-type="string">
                <text:p>Mysql 9.7.0
(k8 Nodeport+docker)</text:p>
                <draw:g>
                  <svg:desc>PS.D1:PS.D1</svg:desc>
                </draw:g>
              </table:table-cell>
              <table:table-cell office:value-type="string">
                <text:p>Mysql 9.7.0
(k8 LB+docker)</text:p>
                <draw:g>
                  <svg:desc>PS.E1:PS.E1</svg:desc>
                </draw:g>
              </table:table-cell>
              <table:table-cell office:value-type="string">
                <text:p>Mysql 9.7.0
(k8 Nodeport+containerd)</text:p>
                <draw:g>
                  <svg:desc>PS.F1:P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S.A2:PS.A5</svg:desc>
                </draw:g>
              </table:table-cell>
              <table:table-cell office:value-type="float" office:value="28036.3">
                <text:p>28036.3</text:p>
                <draw:g>
                  <svg:desc>PS.B2:PS.B5</svg:desc>
                </draw:g>
              </table:table-cell>
              <table:table-cell office:value-type="float" office:value="21464.4">
                <text:p>21464.4</text:p>
                <draw:g>
                  <svg:desc>PS.F2:PS.F5</svg:desc>
                </draw:g>
              </table:table-cell>
              <table:table-cell office:value-type="float" office:value="12280.62">
                <text:p>12280.62</text:p>
                <draw:g>
                  <svg:desc>PS.D2:PS.D5</svg:desc>
                </draw:g>
              </table:table-cell>
              <table:table-cell office:value-type="float" office:value="12528.32">
                <text:p>12528.32</text:p>
                <draw:g>
                  <svg:desc>PS.E2:PS.E5</svg:desc>
                </draw:g>
              </table:table-cell>
              <table:table-cell office:value-type="float" office:value="21464.4">
                <text:p>21464.4</text:p>
                <draw:g>
                  <svg:desc>PS.F2:PS.F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2371.82">
                <text:p>52371.82</text:p>
              </table:table-cell>
              <table:table-cell office:value-type="float" office:value="39372.24">
                <text:p>39372.24</text:p>
              </table:table-cell>
              <table:table-cell office:value-type="float" office:value="23091.35">
                <text:p>23091.35</text:p>
              </table:table-cell>
              <table:table-cell office:value-type="float" office:value="23259.13">
                <text:p>23259.13</text:p>
              </table:table-cell>
              <table:table-cell office:value-type="float" office:value="39372.24">
                <text:p>39372.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868.2">
                <text:p>86868.2</text:p>
              </table:table-cell>
              <table:table-cell office:value-type="float" office:value="65442.19">
                <text:p>65442.19</text:p>
              </table:table-cell>
              <table:table-cell office:value-type="float" office:value="39016.07">
                <text:p>39016.07</text:p>
              </table:table-cell>
              <table:table-cell office:value-type="float" office:value="38880.1">
                <text:p>38880.1</text:p>
              </table:table-cell>
              <table:table-cell office:value-type="float" office:value="65442.19">
                <text:p>65442.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9438.23">
                <text:p>119438.23</text:p>
              </table:table-cell>
              <table:table-cell office:value-type="float" office:value="95500.06">
                <text:p>95500.06</text:p>
              </table:table-cell>
              <table:table-cell office:value-type="float" office:value="52888.53">
                <text:p>52888.53</text:p>
              </table:table-cell>
              <table:table-cell office:value-type="float" office:value="51029.16">
                <text:p>51029.16</text:p>
              </table:table-cell>
              <table:table-cell office:value-type="float" office:value="95500.06">
                <text:p>9550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